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quarkus-pha</text:p>
      <text:p text:style-name="Text_20_body">This is a sample text document used by the <text:span text:style-name="Strong_20_Emphasis">document-editor</text:span> showcase. It is served via the WOPI host endpoint and rendered inside Collabora Online (LibreOffice in the browser).</text:p>
      <text:h text:style-name="Heading_20_2" text:outline-level="2">What you can do</text:h>
      <text:list text:style-name="L1">
        <text:list-item>
          <text:p text:style-name="P2">Edit text and formatting from the browser </text:p>
        </text:list-item>
        <text:list-item>
          <text:p text:style-name="P2">Use the toolbar to save, print, download, and go fullscreen </text:p>
        </text:list-item>
        <text:list-item>
          <text:p text:style-name="P3">Multiple users can edit the same document collaboratively </text:p>
        </text:list-item>
      </text:list>
      <text:h text:style-name="Heading_20_2" text:outline-level="2">About the stack</text:h>
      <text:p text:style-name="Text_20_body">The browser embeds the editor via an <text:span text:style-name="Source_20_Text">iframe</text:span>, and communicates with the server using the <text:span text:style-name="Emphasis">WOPI protocol</text:span> and PostMessage API. Quarkus serves the document bytes; Collabora Online runs the actual office eng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elcome</dc:title>
    <meta:document-statistic meta:table-count="0" meta:image-count="0" meta:object-count="0" meta:page-count="1" meta:paragraph-count="8" meta:word-count="98" meta:character-count="595" meta:non-whitespace-character-count="505"/>
    <meta:generator>LibreOffice/26.2.2.2$Linux_X86_64 LibreOffice_project/620$Build-2</meta:generator>
    <meta:user-defined meta:name=""/>
  </office:meta>
</office:document-meta>
</file>