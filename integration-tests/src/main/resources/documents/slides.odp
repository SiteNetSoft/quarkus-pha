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9.75cm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fo:min-height="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fo:min-height="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36pt" fo:font-weight="bold"/>
    </style:style>
    <style:style style:name="P2" style:family="paragraph">
      <loext:graphic-properties draw:fill="none"/>
      <style:text-properties fo:font-size="2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0">
        <draw:frame presentation:style-name="pr1" draw:text-style-name="P1" draw:layer="layout" svg:width="22cm" svg:height="4cm" svg:x="2cm" svg:y="6cm" presentation:class="title">
          <draw:text-box>
            <text:p>quarkus-pha</text:p>
          </draw:text-box>
        </draw:frame>
        <draw:frame draw:style-name="gr1" draw:text-style-name="P2" draw:layer="layout" svg:width="22cm" svg:height="3cm" svg:x="2cm" svg:y="11cm">
          <draw:text-box>
            <text:p>Framework-free frontend components on Quarkus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ck" draw:style-name="dp1" draw:master-page-name="Default">
        <draw:frame presentation:style-name="pr3" draw:text-style-name="P1" draw:layer="layout" svg:width="22cm" svg:height="3cm" svg:x="2cm" svg:y="2cm" presentation:class="title">
          <draw:text-box>
            <text:p>The stack</text:p>
          </draw:text-box>
        </draw:frame>
        <draw:frame draw:style-name="gr3" draw:text-style-name="P2" draw:layer="layout" svg:width="22cm" svg:height="10cm" svg:x="2cm" svg:y="6cm">
          <draw:text-box>
            <text:p>PatternFly — design system (CSS only)</text:p>
            <text:p>Alpine.js — reactivity</text:p>
            <text:p>HTMX — partial swaps from the server</text:p>
            <text:p>Qute — server-side templating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29"/>
    <meta:generator>LibreOffice/26.2.2.2$Linux_X86_64 LibreOffice_project/620$Build-2</meta:generator>
  </office:meta>
</office:document-meta>
</file>